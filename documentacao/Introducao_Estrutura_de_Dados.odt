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367aa" officeooo:paragraph-rsid="002367aa"/>
    </style:style>
    <style:style style:name="P2" style:family="paragraph" style:parent-style-name="Standard">
      <style:text-properties officeooo:rsid="0018c944" officeooo:paragraph-rsid="0018c944"/>
    </style:style>
    <style:style style:name="P3" style:family="paragraph" style:parent-style-name="Standard">
      <style:text-properties officeooo:rsid="0018c944" officeooo:paragraph-rsid="001aa20a"/>
    </style:style>
    <style:style style:name="P4" style:family="paragraph" style:parent-style-name="Standard">
      <style:text-properties officeooo:rsid="0018c944" officeooo:paragraph-rsid="001bf479"/>
    </style:style>
    <style:style style:name="P5" style:family="paragraph" style:parent-style-name="Standard">
      <style:text-properties officeooo:rsid="0018c944" officeooo:paragraph-rsid="001ceec5"/>
    </style:style>
    <style:style style:name="P6" style:family="paragraph" style:parent-style-name="Standard">
      <style:text-properties officeooo:rsid="0018c944" officeooo:paragraph-rsid="001eec7c"/>
    </style:style>
    <style:style style:name="P7" style:family="paragraph" style:parent-style-name="Standard">
      <style:text-properties officeooo:rsid="001bf479" officeooo:paragraph-rsid="001bf479"/>
    </style:style>
    <style:style style:name="P8" style:family="paragraph" style:parent-style-name="Standard">
      <style:text-properties officeooo:rsid="0021257a" officeooo:paragraph-rsid="0021257a"/>
    </style:style>
    <style:style style:name="P9" style:family="paragraph" style:parent-style-name="Standard">
      <style:text-properties officeooo:rsid="0021d87d" officeooo:paragraph-rsid="0021d87d"/>
    </style:style>
    <style:style style:name="P10" style:family="paragraph" style:parent-style-name="Heading_20_4">
      <style:text-properties officeooo:rsid="002367aa" officeooo:paragraph-rsid="002367aa"/>
    </style:style>
    <style:style style:name="P11" style:family="paragraph" style:parent-style-name="Heading_20_4">
      <style:text-properties officeooo:paragraph-rsid="0029ed25"/>
    </style:style>
    <style:style style:name="P12" style:family="paragraph" style:parent-style-name="Text_20_body">
      <style:text-properties fo:font-weight="normal" officeooo:rsid="002a8024" officeooo:paragraph-rsid="002a8024" style:font-weight-asian="normal" style:font-weight-complex="normal"/>
    </style:style>
    <style:style style:name="P13" style:family="paragraph" style:parent-style-name="Text_20_body">
      <style:text-properties fo:font-weight="normal" officeooo:rsid="002aab77" officeooo:paragraph-rsid="002aab77" style:font-weight-asian="normal" style:font-weight-complex="normal"/>
    </style:style>
    <style:style style:name="P14" style:family="paragraph" style:parent-style-name="Text_20_body">
      <style:text-properties fo:font-weight="normal" officeooo:rsid="002b7766" officeooo:paragraph-rsid="002b7766" style:font-weight-asian="normal" style:font-weight-complex="normal"/>
    </style:style>
    <style:style style:name="P15" style:family="paragraph" style:parent-style-name="Text_20_body">
      <style:text-properties fo:font-weight="bold" officeooo:rsid="0024fb41" officeooo:paragraph-rsid="0024fb41" style:font-weight-asian="bold" style:font-weight-complex="bold"/>
    </style:style>
    <style:style style:name="P16" style:family="paragraph" style:parent-style-name="Text_20_body">
      <style:text-properties fo:font-weight="bold" officeooo:rsid="0029ed25" officeooo:paragraph-rsid="0029ed25" style:font-weight-asian="bold" style:font-weight-complex="bold"/>
    </style:style>
    <style:style style:name="P17" style:family="paragraph" style:parent-style-name="Text_20_body">
      <style:text-properties officeooo:rsid="0029ed25" officeooo:paragraph-rsid="0024fb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a20a" style:font-weight-asian="bold" style:font-weight-complex="bold"/>
    </style:style>
    <style:style style:name="T3" style:family="text">
      <style:text-properties fo:font-weight="bold" officeooo:rsid="001eec7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8c6ed" style:font-weight-asian="normal" style:font-weight-complex="normal"/>
    </style:style>
    <style:style style:name="T6" style:family="text">
      <style:text-properties officeooo:rsid="001aa20a"/>
    </style:style>
    <style:style style:name="T7" style:family="text">
      <style:text-properties officeooo:rsid="001eec7c"/>
    </style:style>
    <style:style style:name="T8" style:family="text">
      <style:text-properties officeooo:rsid="0021257a"/>
    </style:style>
    <style:style style:name="T9" style:family="text">
      <style:text-properties officeooo:rsid="0029ed25"/>
    </style:style>
    <style:style style:name="T10" style:family="text">
      <style:text-properties officeooo:rsid="002367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ma estrutura de dados é uma forma organizada de armazenar e gerenciar dados na memória, de modo que operações como inserção, remoção e busca possam ser realizados de forma eficiente.</text:p>
      <text:p text:style-name="P2"/>
      <text:h text:style-name="Heading_20_4" text:outline-level="4">Array</text:h>
      <text:p text:style-name="P4"><text:span text:style-name="T1">Acesso</text:span>: O(1) </text:p>
      <text:p text:style-name="P4"><text:span text:style-name="T1">inserção</text:span>: O(n) </text:p>
      <text:p text:style-name="P4"><text:span text:style-name="T1">remoção</text:span>: O(n) </text:p>
      <text:p text:style-name="P2"><text:span text:style-name="T1">Uso típico: </text:span><text:span text:style-name="T4">D</text:span>ados de tamanho fixo</text:p>
      <text:p text:style-name="P2"/>
      <text:h text:style-name="Heading_20_4" text:outline-level="4">Lista Vinculada</text:h>
      <text:p text:style-name="P4"><text:span text:style-name="T1">Acesso</text:span>: O(n) </text:p>
      <text:p text:style-name="P2"><text:span text:style-name="T3">inserção</text:span><text:span text:style-name="T7">: </text:span>O(1)* </text:p>
      <text:p text:style-name="P6"><text:span text:style-name="T1">remoção</text:span>: O(1)* </text:p>
      <text:p text:style-name="P2"><text:span text:style-name="T1">Uso típico: </text:span><text:span text:style-name="T4">D</text:span>ados dinâmicos, filas</text:p>
      <text:p text:style-name="P2"/>
      <text:h text:style-name="Heading_20_4" text:outline-level="4">Pilha</text:h>
      <text:p text:style-name="P6"><text:span text:style-name="T1">Acesso</text:span>: O(1)topo </text:p>
      <text:p text:style-name="P6"><text:span text:style-name="T1">inserção</text:span>: O(1) </text:p>
      <text:p text:style-name="P6"><text:span text:style-name="T1">remoção</text:span>: O(1) </text:p>
      <text:p text:style-name="P2"><text:span text:style-name="T1">Uso típico: </text:span><text:span text:style-name="T4">C</text:span>hamadas de função, undo</text:p>
      <text:p text:style-name="P2"/>
      <text:h text:style-name="Heading_20_4" text:outline-level="4">Fila</text:h>
      <text:p text:style-name="P3"><text:span text:style-name="T2">Acesso:</text:span><text:span text:style-name="T6"> </text:span>O(1)frente </text:p>
      <text:p text:style-name="P3"><text:span text:style-name="T2">Inserção</text:span><text:span text:style-name="T6">: </text:span>O(1)</text:p>
      <text:p text:style-name="P3"><text:span text:style-name="T2">Remoção</text:span><text:span text:style-name="T6">: </text:span>O(1) </text:p>
      <text:p text:style-name="P2"><text:span text:style-name="T1">Uso típico: </text:span>Filas de processos, BFS</text:p>
      <text:p text:style-name="P2"/>
      <text:h text:style-name="Heading_20_4" text:outline-level="4">Árvore BST</text:h>
      <text:p text:style-name="P5"><text:span text:style-name="T1">Acesso</text:span>: O(log n)* </text:p>
      <text:p text:style-name="P5"><text:span text:style-name="T1">inserção</text:span>: O(log n)* </text:p>
      <text:p text:style-name="P5"><text:span text:style-name="T1">remoção</text:span>: O(log n)* </text:p>
      <text:p text:style-name="P2"><text:span text:style-name="T1">Uso típico:</text:span> Busca ordenada</text:p>
      <text:p text:style-name="P2"/>
      <text:h text:style-name="Heading_20_4" text:outline-level="4">Estrutura Lineares</text:h>
      <text:p text:style-name="P7">Cada elemento tem no máximo um predecessor e um sucessor</text:p>
      <text:p text:style-name="P7"/>
      <text:h text:style-name="Heading_20_4" text:outline-level="4">Estrutura Não-Lineares</text:h>
      <text:p text:style-name="P7">Os elementos podem ter múltiplos predecessores e sucessores</text:p>
      <text:p text:style-name="P7"/>
      <text:p text:style-name="P7">// <text:span text:style-name="T8">Stack (pilha de execução) – alocação automática, escopo limitado</text:span></text:p>
      <text:p text:style-name="P8">int x = 10; <text:s/><text:tab/>// variável local na stack</text:p>
      <text:p text:style-name="P8">int arr[5] = {1,2,3,4,5}</text:p>
      <text:p text:style-name="P8"/>
      <text:p text:style-name="P9">Se você aloca com new e esquecer de usar delete a memória fica presa até terminar o programa. Todo espaço alocado deve ser liberado.</text:p>
      <text:p text:style-name="P9"/>
      <text:h text:style-name="P10" text:outline-level="4"><text:soft-page-break/>Classes auto-referenciais</text:h>
      <text:p text:style-name="P1">Uma classe auto-referencial contém um ou mais ponteiros que apontam para objetos do mesmo tipo. Este é o bloco de construção fundamental de quase toda estrutura de dados dinâmicos: listas, pilhas, filas e árvores são todas baseadas nesse conceito.</text:p>
      <text:p text:style-name="P15">Conceito-chave: <text:span text:style-name="T4">Não é possível incluir um objeto do mesmo tipo dentro de si mesmo (isso teria tamanho infinito), mas é perfeitamente válido incluir um </text:span>ponteiro<text:span text:style-name="T4"> para o mesmo tipo – um ponteiro tem tamanho fixo(4 ou 8 bytes).</text:span></text:p>
      <text:p text:style-name="P17"/>
      <text:h text:style-name="P11" text:outline-level="4"><text:span text:style-name="T9">Listas</text:span><text:span text:style-name="T10"> </text:span><text:span text:style-name="T9">circulares</text:span></text:h>
      <text:p text:style-name="P16"><text:span text:style-name="T5">R</text:span><text:span text:style-name="T4">ound Robin (CPU)</text:span></text:p>
      <text:p text:style-name="P16"><text:span text:style-name="T5">0</text:span><text:span text:style-name="T4">2 – Ring Buffer – Produtor/Consumidor tem array com dois índices head / tail, sem alocação dinâmicos, sem cache misses. Presente em todo sistema baixa nível<text:line-break/><text:line-break/>Onde é usado: Pipe unix – a implementação do pipe(2) no Kernel Linux</text:span></text:p>
      <text:p text:style-name="P12">Comportamento para quando o buffer estiver cheio: Blocking, Drop Newest, Drop Oldest</text:p>
      <text:p text:style-name="P13">03 – Free List: coração do gerenciador de memória do sistema operacional. Uma lista encadeada de blocos de memórias livres. Ideia central: lista intrusiva</text:p>
      <text:p text:style-name="P14">Coalescência: fundir blocos livres adjacen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6T16:33:55.127863168</meta:creation-date>
    <meta:generator>LibreOffice/24.2.7.2$Linux_X86_64 LibreOffice_project/420$Build-2</meta:generator>
    <dc:date>2026-06-08T16:04:59.728137019</dc:date>
    <meta:editing-duration>PT1H45M49S</meta:editing-duration>
    <meta:editing-cycles>16</meta:editing-cycles>
    <meta:document-statistic meta:table-count="0" meta:image-count="0" meta:object-count="0" meta:page-count="2" meta:paragraph-count="43" meta:word-count="324" meta:character-count="2079" meta:non-whitespace-character-count="1775"/>
  </office:meta>
</office:document-meta>
</file>