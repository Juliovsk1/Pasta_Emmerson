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Google Sans" svg:font-family="'Google Sans', Roboto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">
      <style:paragraph-properties fo:line-height="150%"/>
      <style:text-properties officeooo:rsid="001f31c1" officeooo:paragraph-rsid="001f31c1"/>
    </style:style>
    <style:style style:name="P2" style:family="paragraph" style:parent-style-name="Text_20_body">
      <style:paragraph-properties fo:line-height="150%"/>
      <style:text-properties officeooo:rsid="001f31c1" officeooo:paragraph-rsid="001f31c1"/>
    </style:style>
    <style:style style:name="P3" style:family="paragraph" style:parent-style-name="Text_20_body">
      <style:paragraph-properties fo:line-height="150%"/>
    </style:style>
    <style:style style:name="P4" style:family="paragraph" style:parent-style-name="Text_20_body">
      <style:paragraph-properties fo:line-height="150%"/>
      <style:text-properties officeooo:paragraph-rsid="001f31c1"/>
    </style:style>
    <style:style style:name="P5" style:family="paragraph" style:parent-style-name="Text_20_body">
      <style:text-properties officeooo:rsid="0023ba49" officeooo:paragraph-rsid="0023ba49"/>
    </style:style>
    <style:style style:name="P6" style:family="paragraph" style:parent-style-name="Text_20_body">
      <style:text-properties officeooo:rsid="0027d448" officeooo:paragraph-rsid="0027d448"/>
    </style:style>
    <style:style style:name="P7" style:family="paragraph" style:parent-style-name="Standard">
      <style:paragraph-properties fo:line-height="150%"/>
      <style:text-properties fo:font-variant="normal" fo:text-transform="none" fo:color="#1f1f1f" loext:opacity="100%" style:font-name="Google Sans" fo:font-size="15pt" fo:letter-spacing="normal" fo:font-style="normal" fo:font-weight="normal" officeooo:rsid="001a9096" officeooo:paragraph-rsid="001a9096" style:font-size-asian="15pt" style:font-weight-asian="bold" style:font-size-complex="15pt" style:font-weight-complex="bold"/>
    </style:style>
    <style:style style:name="P8" style:family="paragraph" style:parent-style-name="Standard">
      <style:paragraph-properties fo:line-height="150%"/>
      <style:text-properties fo:font-variant="normal" fo:text-transform="none" fo:color="#1f1f1f" loext:opacity="100%" style:font-name="Google Sans" fo:font-size="15pt" fo:letter-spacing="normal" fo:font-style="normal" fo:font-weight="normal" officeooo:rsid="001129ee" officeooo:paragraph-rsid="001129ee" style:font-size-asian="15pt" style:font-weight-asian="bold" style:font-size-complex="15pt" style:font-weight-complex="bold"/>
    </style:style>
    <style:style style:name="P9" style:family="paragraph" style:parent-style-name="Standard">
      <style:paragraph-properties fo:line-height="150%"/>
      <style:text-properties fo:font-variant="normal" fo:text-transform="none" fo:color="#1f1f1f" loext:opacity="100%" style:font-name="Google Sans" fo:font-size="15pt" fo:letter-spacing="normal" fo:font-style="normal" fo:font-weight="normal" officeooo:rsid="0014d5bc" officeooo:paragraph-rsid="0014d5bc" style:font-size-asian="15pt" style:font-weight-asian="bold" style:font-size-complex="15pt" style:font-weight-complex="bold"/>
    </style:style>
    <style:style style:name="P10" style:family="paragraph" style:parent-style-name="Standard">
      <style:paragraph-properties fo:line-height="150%"/>
      <style:text-properties fo:font-variant="normal" fo:text-transform="none" fo:color="#1f1f1f" loext:opacity="100%" style:font-name="Google Sans" fo:font-size="15pt" fo:letter-spacing="normal" fo:font-style="normal" fo:font-weight="normal" officeooo:rsid="00163719" officeooo:paragraph-rsid="00163719" style:font-size-asian="15pt" style:font-weight-asian="bold" style:font-size-complex="15pt" style:font-weight-complex="bold"/>
    </style:style>
    <style:style style:name="P11" style:family="paragraph" style:parent-style-name="Standard">
      <style:paragraph-properties fo:line-height="150%"/>
      <style:text-properties fo:font-variant="normal" fo:text-transform="none" fo:color="#1f1f1f" loext:opacity="100%" style:font-name="Google Sans" fo:font-size="15pt" fo:letter-spacing="normal" fo:font-style="normal" fo:font-weight="normal" officeooo:rsid="00188b4b" officeooo:paragraph-rsid="00188b4b" style:font-size-asian="15pt" style:font-weight-asian="bold" style:font-size-complex="15pt" style:font-weight-complex="bold"/>
    </style:style>
    <style:style style:name="P12" style:family="paragraph" style:parent-style-name="Standard">
      <style:paragraph-properties fo:line-height="150%"/>
      <style:text-properties fo:font-size="15pt" style:font-size-asian="15pt" style:font-size-complex="15pt"/>
    </style:style>
    <style:style style:name="P13" style:family="paragraph" style:parent-style-name="Standard">
      <style:paragraph-properties fo:line-height="150%"/>
      <style:text-properties fo:font-size="15pt" officeooo:rsid="000378e2" officeooo:paragraph-rsid="000378e2" style:font-size-asian="15pt" style:font-size-complex="15pt"/>
    </style:style>
    <style:style style:name="P14" style:family="paragraph" style:parent-style-name="Standard">
      <style:paragraph-properties fo:line-height="150%"/>
      <style:text-properties fo:font-size="15pt" officeooo:rsid="00067416" officeooo:paragraph-rsid="00067416" style:font-size-asian="15pt" style:font-size-complex="15pt"/>
    </style:style>
    <style:style style:name="P15" style:family="paragraph" style:parent-style-name="Standard">
      <style:paragraph-properties fo:line-height="150%"/>
      <style:text-properties fo:font-size="15pt" officeooo:rsid="00079a23" officeooo:paragraph-rsid="00079a23" style:font-size-asian="15pt" style:font-size-complex="15pt"/>
    </style:style>
    <style:style style:name="P16" style:family="paragraph" style:parent-style-name="Standard">
      <style:paragraph-properties fo:line-height="150%"/>
      <style:text-properties fo:font-size="15pt" officeooo:rsid="0008c3ac" officeooo:paragraph-rsid="0008c3ac" style:font-size-asian="15pt" style:font-size-complex="15pt"/>
    </style:style>
    <style:style style:name="P17" style:family="paragraph" style:parent-style-name="Standard">
      <style:paragraph-properties fo:line-height="150%"/>
      <style:text-properties fo:font-size="15pt" officeooo:rsid="000a227c" officeooo:paragraph-rsid="000a227c" style:font-size-asian="15pt" style:font-size-complex="15pt"/>
    </style:style>
    <style:style style:name="P18" style:family="paragraph" style:parent-style-name="Standard">
      <style:paragraph-properties fo:line-height="150%"/>
      <style:text-properties fo:font-size="15pt" officeooo:rsid="000c5989" officeooo:paragraph-rsid="000c5989" style:font-size-asian="15pt" style:font-size-complex="15pt"/>
    </style:style>
    <style:style style:name="P19" style:family="paragraph" style:parent-style-name="Standard">
      <style:paragraph-properties fo:line-height="150%"/>
      <style:text-properties fo:font-size="15pt" officeooo:rsid="000e39a0" officeooo:paragraph-rsid="000e39a0" style:font-size-asian="15pt" style:font-size-complex="15pt"/>
    </style:style>
    <style:style style:name="P20" style:family="paragraph" style:parent-style-name="Standard">
      <style:paragraph-properties fo:line-height="150%"/>
      <style:text-properties fo:font-size="15pt" fo:font-weight="bold" officeooo:rsid="000f9134" officeooo:paragraph-rsid="000f9134" style:font-size-asian="15pt" style:font-weight-asian="bold" style:font-size-complex="15pt" style:font-weight-complex="bold"/>
    </style:style>
    <style:style style:name="P21" style:family="paragraph" style:parent-style-name="Standard">
      <style:paragraph-properties fo:line-height="150%"/>
      <style:text-properties fo:font-size="15pt" fo:font-weight="bold" officeooo:rsid="001129ee" officeooo:paragraph-rsid="001129ee" style:font-size-asian="15pt" style:font-weight-asian="bold" style:font-size-complex="15pt" style:font-weight-complex="bold"/>
    </style:style>
    <style:style style:name="P22" style:family="paragraph" style:parent-style-name="Standard">
      <style:paragraph-properties fo:line-height="150%"/>
      <style:text-properties fo:font-size="15pt" fo:font-weight="bold" officeooo:rsid="0014d5bc" officeooo:paragraph-rsid="0014d5bc" style:font-size-asian="15pt" style:font-weight-asian="bold" style:font-size-complex="15pt" style:font-weight-complex="bold"/>
    </style:style>
    <style:style style:name="P23" style:family="paragraph" style:parent-style-name="Standard">
      <style:paragraph-properties fo:line-height="150%"/>
      <style:text-properties fo:font-size="15pt" fo:font-weight="bold" officeooo:rsid="00188b4b" officeooo:paragraph-rsid="00188b4b" style:font-size-asian="15pt" style:font-weight-asian="bold" style:font-size-complex="15pt" style:font-weight-complex="bold"/>
    </style:style>
    <style:style style:name="P24" style:family="paragraph" style:parent-style-name="Standard">
      <style:paragraph-properties fo:line-height="150%"/>
      <style:text-properties fo:font-size="18pt" fo:font-weight="bold" officeooo:rsid="000c5989" officeooo:paragraph-rsid="000c5989" style:font-size-asian="18pt" style:font-weight-asian="bold" style:font-size-complex="18pt" style:font-weight-complex="bold"/>
    </style:style>
    <style:style style:name="P25" style:family="paragraph" style:parent-style-name="Text_20_body">
      <style:paragraph-properties fo:line-height="150%"/>
      <style:text-properties fo:color="#000000" loext:opacity="100%" officeooo:rsid="001f31c1" officeooo:paragraph-rsid="001f31c1" fo:background-color="#81d41a"/>
    </style:style>
    <style:style style:name="P26" style:family="paragraph" style:parent-style-name="Text_20_body">
      <style:paragraph-properties fo:margin-top="0cm" fo:margin-bottom="0cm" style:contextual-spacing="false" fo:line-height="150%"/>
      <style:text-properties fo:color="#000000" loext:opacity="100%" officeooo:rsid="001f31c1" officeooo:paragraph-rsid="001f31c1" fo:background-color="#ffffff"/>
    </style:style>
    <style:style style:name="P27" style:family="paragraph" style:parent-style-name="Text_20_body">
      <style:paragraph-properties fo:margin-top="0cm" fo:margin-bottom="0cm" style:contextual-spacing="false" fo:line-height="150%"/>
      <style:text-properties fo:color="#000000" loext:opacity="100%" officeooo:rsid="002210ed" officeooo:paragraph-rsid="002210ed" fo:background-color="#ffffff"/>
    </style:style>
    <style:style style:name="P28" style:family="paragraph" style:parent-style-name="Text_20_body">
      <style:paragraph-properties fo:margin-top="0cm" fo:margin-bottom="0cm" style:contextual-spacing="false" fo:line-height="150%"/>
      <style:text-properties fo:color="#000000" loext:opacity="100%" fo:font-style="normal" officeooo:rsid="002210ed" officeooo:paragraph-rsid="002210ed" fo:background-color="#ffffff" style:font-style-asian="normal" style:font-style-complex="normal"/>
    </style:style>
    <style:style style:name="P29" style:family="paragraph" style:parent-style-name="Text_20_body">
      <style:text-properties officeooo:paragraph-rsid="0023ba49"/>
    </style:style>
    <style:style style:name="P30" style:family="paragraph" style:parent-style-name="Text_20_body">
      <style:text-properties officeooo:rsid="00255f86" officeooo:paragraph-rsid="00255f86"/>
    </style:style>
    <style:style style:name="P31" style:family="paragraph" style:parent-style-name="Text_20_body">
      <style:text-properties officeooo:rsid="0025f934" officeooo:paragraph-rsid="0025f934"/>
    </style:style>
    <style:style style:name="P32" style:family="paragraph" style:parent-style-name="Text_20_body">
      <style:text-properties officeooo:paragraph-rsid="0027d448"/>
    </style:style>
    <style:style style:name="P33" style:family="paragraph" style:parent-style-name="Text_20_body">
      <style:text-properties fo:font-weight="bold" officeooo:rsid="00255f86" officeooo:paragraph-rsid="00255f86" style:font-weight-asian="bold" style:font-weight-complex="bold"/>
    </style:style>
    <style:style style:name="P34" style:family="paragraph" style:parent-style-name="Heading">
      <style:text-properties fo:font-weight="bold" officeooo:rsid="0032ee5d" officeooo:paragraph-rsid="0032ee5d" style:font-weight-asian="bold" style:font-weight-complex="bold"/>
    </style:style>
    <style:style style:name="P35" style:family="paragraph" style:parent-style-name="Text_20_body">
      <style:text-properties fo:font-weight="bold" officeooo:rsid="0032ee5d" officeooo:paragraph-rsid="0032ee5d" style:font-weight-asian="bold" style:font-weight-complex="bold"/>
    </style:style>
    <style:style style:name="P36" style:family="paragraph" style:parent-style-name="Text_20_body">
      <style:text-properties fo:font-weight="bold" officeooo:rsid="003591c8" officeooo:paragraph-rsid="003591c8" style:font-weight-asian="bold" style:font-weight-complex="bold"/>
    </style:style>
    <style:style style:name="P37" style:family="paragraph" style:parent-style-name="Text_20_body">
      <style:text-properties fo:font-weight="bold" officeooo:rsid="003af952" officeooo:paragraph-rsid="003af952" style:font-weight-asian="bold" style:font-weight-complex="bold"/>
    </style:style>
    <style:style style:name="P38" style:family="paragraph" style:parent-style-name="Heading">
      <style:text-properties officeooo:rsid="002999cf" officeooo:paragraph-rsid="002999cf"/>
    </style:style>
    <style:style style:name="P39" style:family="paragraph" style:parent-style-name="Text_20_body">
      <style:text-properties officeooo:rsid="002999cf" officeooo:paragraph-rsid="002999cf"/>
    </style:style>
    <style:style style:name="P40" style:family="paragraph" style:parent-style-name="Heading">
      <style:text-properties fo:background-color="#ffff00"/>
    </style:style>
    <style:style style:name="P41" style:family="paragraph" style:parent-style-name="Heading">
      <style:text-properties officeooo:rsid="002c94db" officeooo:paragraph-rsid="002c94db"/>
    </style:style>
    <style:style style:name="P42" style:family="paragraph" style:parent-style-name="Text_20_body">
      <style:text-properties officeooo:rsid="002c94db" officeooo:paragraph-rsid="002c94db"/>
    </style:style>
    <style:style style:name="P43" style:family="paragraph" style:parent-style-name="Heading">
      <style:text-properties officeooo:paragraph-rsid="0032ee5d"/>
    </style:style>
    <style:style style:name="P44" style:family="paragraph" style:parent-style-name="Text_20_body">
      <style:text-properties officeooo:paragraph-rsid="002999cf"/>
    </style:style>
    <style:style style:name="P45" style:family="paragraph" style:parent-style-name="Text_20_body">
      <style:text-properties style:text-position="0% 100%" fo:font-weight="bold" officeooo:rsid="002999cf" officeooo:paragraph-rsid="002999cf" style:font-weight-asian="bold" style:font-weight-complex="bold"/>
    </style:style>
    <style:style style:name="P46" style:family="paragraph" style:parent-style-name="Text_20_body">
      <style:text-properties officeooo:rsid="002f5a48" officeooo:paragraph-rsid="002f5a48"/>
    </style:style>
    <style:style style:name="P47" style:family="paragraph" style:parent-style-name="Text_20_body">
      <style:text-properties fo:font-style="normal" fo:font-weight="bold" officeooo:rsid="003c75db" officeooo:paragraph-rsid="003c75db" style:font-style-asian="normal" style:font-weight-asian="bold" style:font-style-complex="normal" style:font-weight-complex="bold"/>
    </style:style>
    <style:style style:name="P48" style:family="paragraph" style:parent-style-name="Text_20_body">
      <style:text-properties fo:font-style="normal" fo:font-weight="bold" officeooo:rsid="003d8554" officeooo:paragraph-rsid="003d8554" style:font-style-asian="normal" style:font-weight-asian="bold" style:font-style-complex="normal" style:font-weight-complex="bold"/>
    </style:style>
    <style:style style:name="P49" style:family="paragraph" style:parent-style-name="Text_20_body">
      <style:text-properties fo:font-style="normal" fo:font-weight="bold" officeooo:rsid="003e9f19" officeooo:paragraph-rsid="003e9f19" style:font-style-asian="normal" style:font-weight-asian="bold" style:font-style-complex="normal" style:font-weight-complex="bold"/>
    </style:style>
    <style:style style:name="P50" style:family="paragraph" style:parent-style-name="Text_20_body">
      <style:paragraph-properties fo:margin-top="0cm" fo:margin-bottom="0cm" style:contextual-spacing="false"/>
      <style:text-properties fo:font-style="normal" fo:font-weight="bold" officeooo:rsid="0040883e" officeooo:paragraph-rsid="0040883e" style:font-style-asian="normal" style:font-weight-asian="bold" style:font-style-complex="normal" style:font-weight-complex="bold"/>
    </style:style>
    <style:style style:name="P51" style:family="paragraph" style:parent-style-name="Text_20_body">
      <style:paragraph-properties fo:margin-top="0.201cm" fo:margin-bottom="0.201cm" style:contextual-spacing="false"/>
      <style:text-properties fo:font-style="normal" fo:font-weight="bold" officeooo:rsid="0040883e" officeooo:paragraph-rsid="0040883e" style:font-style-asian="normal" style:font-weight-asian="bold" style:font-style-complex="normal" style:font-weight-complex="bold"/>
    </style:style>
    <style:style style:name="P52" style:family="paragraph" style:parent-style-name="Heading_20_1">
      <style:paragraph-properties fo:line-height="150%"/>
    </style:style>
    <style:style style:name="P53" style:family="paragraph" style:parent-style-name="Heading_20_1">
      <style:paragraph-properties fo:line-height="150%"/>
      <style:text-properties officeooo:rsid="001f31c1" officeooo:paragraph-rsid="001f31c1"/>
    </style:style>
    <style:style style:name="P54" style:family="paragraph" style:parent-style-name="Heading_20_1">
      <style:text-properties officeooo:rsid="0023ba49" officeooo:paragraph-rsid="0023ba49"/>
    </style:style>
    <style:style style:name="P55" style:family="paragraph" style:parent-style-name="Heading_20_1">
      <style:text-properties officeooo:rsid="0027d448" officeooo:paragraph-rsid="0027d448"/>
    </style:style>
    <style:style style:name="P56" style:family="paragraph" style:parent-style-name="Heading_20_1">
      <style:text-properties style:text-underline-style="solid" style:text-underline-width="auto" style:text-underline-color="font-color" officeooo:rsid="002999cf" officeooo:paragraph-rsid="002999cf"/>
    </style:style>
    <style:style style:name="P57" style:family="paragraph" style:parent-style-name="Heading_20_1">
      <style:text-properties officeooo:rsid="002c94db" officeooo:paragraph-rsid="002c94db"/>
    </style:style>
    <style:style style:name="P58" style:family="paragraph" style:parent-style-name="Heading_20_1">
      <style:text-properties officeooo:rsid="00301cf8" officeooo:paragraph-rsid="00301cf8"/>
    </style:style>
    <style:style style:name="P59" style:family="paragraph" style:parent-style-name="Heading_20_2">
      <style:paragraph-properties fo:line-height="150%"/>
    </style:style>
    <style:style style:name="P60" style:family="paragraph" style:parent-style-name="Text_20_body">
      <style:text-properties fo:font-style="normal" fo:font-weight="normal" officeooo:rsid="003e9f19" officeooo:paragraph-rsid="003e9f19" style:font-style-asian="normal" style:font-weight-asian="normal" style:font-style-complex="normal" style:font-weight-complex="normal"/>
    </style:style>
    <style:style style:name="P61" style:family="paragraph" style:parent-style-name="Text_20_body">
      <style:paragraph-properties fo:margin-top="0cm" fo:margin-bottom="0cm" style:contextual-spacing="false"/>
      <style:text-properties fo:font-style="normal" fo:font-weight="bold" officeooo:rsid="0040883e" officeooo:paragraph-rsid="0040883e" style:font-style-asian="normal" style:font-weight-asian="bold" style:font-style-complex="normal" style:font-weight-complex="bold"/>
    </style:style>
    <style:style style:name="T1" style:family="text">
      <style:text-properties officeooo:rsid="000378e2"/>
    </style:style>
    <style:style style:name="T2" style:family="text">
      <style:text-properties officeooo:rsid="00040f5b"/>
    </style:style>
    <style:style style:name="T3" style:family="text">
      <style:text-properties fo:color="#c9211e" loext:opacity="100%" fo:background-color="#ffcaca" loext:char-shading-value="0"/>
    </style:style>
    <style:style style:name="T4" style:family="text">
      <style:text-properties fo:color="#c9211e" loext:opacity="100%" fo:background-color="#ffd8ce" loext:char-shading-value="0"/>
    </style:style>
    <style:style style:name="T5" style:family="text">
      <style:text-properties fo:color="#355269" loext:opacity="100%" fo:background-color="#dee7e5" loext:char-shading-value="0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0a227c"/>
    </style:style>
    <style:style style:name="T8" style:family="text">
      <style:text-properties officeooo:rsid="000ab519"/>
    </style:style>
    <style:style style:name="T9" style:family="text">
      <style:text-properties officeooo:rsid="000c5989"/>
    </style:style>
    <style:style style:name="T10" style:family="text">
      <style:text-properties officeooo:rsid="000e39a0"/>
    </style:style>
    <style:style style:name="T11" style:family="text">
      <style:text-properties officeooo:rsid="000f8084"/>
    </style:style>
    <style:style style:name="T12" style:family="text">
      <style:text-properties fo:font-size="18pt" fo:font-weight="bold" style:font-size-asian="18pt" style:font-weight-asian="bold" style:font-size-complex="18pt" style:font-weight-complex="bold"/>
    </style:style>
    <style:style style:name="T13" style:family="text">
      <style:text-properties fo:font-size="16pt" fo:font-weight="bold" style:font-size-asian="16pt" style:font-weight-asian="bold" style:font-size-complex="16pt" style:font-weight-complex="bold"/>
    </style:style>
    <style:style style:name="T14" style:family="text">
      <style:text-properties fo:font-variant="normal" fo:text-transform="none" fo:color="#1f1f1f" loext:opacity="100%" style:font-name="Google Sans" fo:font-size="10.5pt" fo:letter-spacing="normal" fo:font-style="normal" fo:font-weight="normal"/>
    </style:style>
    <style:style style:name="T15" style:family="text">
      <style:text-properties fo:font-variant="normal" fo:text-transform="none" fo:color="#1f1f1f" loext:opacity="100%" style:font-name="Google Sans" fo:letter-spacing="normal" fo:font-style="normal"/>
    </style:style>
    <style:style style:name="T16" style:family="text">
      <style:text-properties fo:font-variant="normal" fo:text-transform="none" fo:color="#1f1f1f" loext:opacity="100%" style:font-name="Google Sans" fo:letter-spacing="normal" fo:font-style="normal" fo:font-weight="normal"/>
    </style:style>
    <style:style style:name="T17" style:family="text">
      <style:text-properties fo:font-variant="normal" fo:text-transform="none" fo:color="#1f1f1f" loext:opacity="100%" style:font-name="Google Sans" fo:letter-spacing="normal" fo:font-style="normal" fo:font-weight="normal" fo:background-color="#ffff00" loext:char-shading-value="0"/>
    </style:style>
    <style:style style:name="T18" style:family="text">
      <style:text-properties fo:font-variant="normal" fo:text-transform="none" fo:color="#1f1f1f" loext:opacity="100%" style:font-name="Google Sans" fo:letter-spacing="normal" fo:font-style="normal" fo:font-weight="normal" officeooo:rsid="00181c92"/>
    </style:style>
    <style:style style:name="T19" style:family="text">
      <style:text-properties fo:font-variant="normal" fo:text-transform="none" fo:color="#1f1f1f" loext:opacity="100%" fo:letter-spacing="normal"/>
    </style:style>
    <style:style style:name="T20" style:family="text">
      <style:text-properties officeooo:rsid="001bf1dd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3" style:family="text">
      <style:text-properties fo:font-style="normal" style:font-style-asian="normal" style:font-style-complex="normal"/>
    </style:style>
    <style:style style:name="T24" style:family="text">
      <style:text-properties fo:font-style="normal" fo:font-weight="bold" style:font-style-asian="normal" style:font-weight-asian="bold" style:font-style-complex="normal" style:font-weight-complex="bold"/>
    </style:style>
    <style:style style:name="T2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32ee5d" style:font-style-asian="normal" style:font-weight-asian="normal" style:font-style-complex="normal" style:font-weight-complex="normal"/>
    </style:style>
    <style:style style:name="T27" style:family="text">
      <style:text-properties officeooo:rsid="0027d448"/>
    </style:style>
    <style:style style:name="T28" style:family="text">
      <style:text-properties officeooo:rsid="0028f9ed"/>
    </style:style>
    <style:style style:name="T29" style:family="text">
      <style:text-properties style:text-underline-style="solid" style:text-underline-width="auto" style:text-underline-color="font-color" officeooo:rsid="002999cf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fo:font-weight="normal" officeooo:rsid="0034c563" style:font-weight-asian="normal" style:font-weight-complex="normal"/>
    </style:style>
    <style:style style:name="T32" style:family="text">
      <style:text-properties fo:font-weight="normal" officeooo:rsid="00376762" style:font-weight-asian="normal" style:font-weight-complex="normal"/>
    </style:style>
    <style:style style:name="T33" style:family="text">
      <style:text-properties fo:font-weight="normal" officeooo:rsid="003922a5" style:font-weight-asian="normal" style:font-weight-complex="normal"/>
    </style:style>
    <style:style style:name="T34" style:family="text">
      <style:text-properties officeooo:rsid="0032ee5d"/>
    </style:style>
    <style:style style:name="T35" style:family="text">
      <style:text-properties officeooo:rsid="0034c56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~ → <text:span text:style-name="T1">destrutor</text:span></text:p>
      <text:p text:style-name="P12"/>
      <text:p text:style-name="P13">se tem a classe virtual tem over<text:span text:style-name="T2">r</text:span>ide</text:p>
      <text:p text:style-name="P13">Para ter polimo<text:span text:style-name="T2">r</text:span>fismo precisa ter o virtual</text:p>
      <text:p text:style-name="P13"/>
      <text:p text:style-name="P13"/>
      <text:p text:style-name="P14"><text:span text:style-name="T6">Situação</text:span>: Classe com métodos virtuais</text:p>
      <text:p text:style-name="P14"><text:span text:style-name="T6">Recomendação</text:span>: Destrutor virtual</text:p>
      <text:p text:style-name="P14"><text:span text:style-name="T6">Por quê?</text:span>: Evita <text:span text:style-name="T4">undefined behavior</text:span> ao delatar derivada via ponteiro base</text:p>
      <text:p text:style-name="P14"/>
      <text:p text:style-name="P14"><text:span text:style-name="T6">Situação</text:span>: Sobrescrever método virtual</text:p>
      <text:p text:style-name="P14"><text:span text:style-name="T6">Recomendação</text:span>: Sempre usar <text:span text:style-name="T5">override</text:span></text:p>
      <text:p text:style-name="P14"><text:span text:style-name="T6">Por quê?</text:span>: O compilador valida assinatura;erros de digitação viram erro de compilação</text:p>
      <text:p text:style-name="P14"/>
      <text:p text:style-name="P14"><text:span text:style-name="T6">Situação</text:span>: Instanciar via <text:span text:style-name="T5">new</text:span></text:p>
      <text:p text:style-name="P14"><text:span text:style-name="T6">Recomendação</text:span>: Usar <text:span text:style-name="T5">unique_ptr</text:span> / <text:span text:style-name="T5">shared_ptr</text:span></text:p>
      <text:p text:style-name="P14"><text:span text:style-name="T6">Por quê?</text:span>: Gerenciamento automático de memória;sem vazamentos</text:p>
      <text:p text:style-name="P14"/>
      <text:p text:style-name="P14"><text:span text:style-name="T6">Situação</text:span>: Chamada do método base na derivada</text:p>
      <text:p text:style-name="P14"><text:span text:style-name="T6">Recomendação</text:span>: <text:span text:style-name="T5">Base::metodo()</text:span></text:p>
      <text:p text:style-name="P14"><text:span text:style-name="T6">Por quê?</text:span>: Chama explicitamente a versão da base quando necessário reaproveitá-la</text:p>
      <text:p text:style-name="P14"/>
      <text:p text:style-name="P14"><text:span text:style-name="T6">Situação</text:span>: Hierarquia muito profunda(&gt;3níveis)</text:p>
      <text:p text:style-name="P14"><text:span text:style-name="T6">Recomendação</text:span>: Considere composição</text:p>
      <text:p text:style-name="P14"><text:span text:style-name="T6">Por quê?</text:span>: Hierarquias profundas tornam-se frágeis. “Prefira composição á herança”</text:p>
      <text:p text:style-name="P14"><text:soft-page-break/></text:p>
      <text:p text:style-name="P14"><text:span text:style-name="T6">Situação</text:span>: Copiar objeto polimórfico</text:p>
      <text:p text:style-name="P14"><text:span text:style-name="T6">Recomendação</text:span>: <text:span text:style-name="T3">Cuidado com slicing</text:span></text:p>
      <text:p text:style-name="P14"><text:span text:style-name="T6">Por quê?</text:span>: Base b = derivada; perde os dados da derivada. Use ponteiros.</text:p>
      <text:p text:style-name="P14"/>
      <text:p text:style-name="P14"/>
      <text:p text:style-name="P15">O que torna uma classe “Abstrata” em C++?</text:p>
      <text:p text:style-name="P16"><text:s text:c="3"/>Em c++, não existe palavra-chave abstract. Para ser considerada abstract precisa ter pelo menos um método virtual puro (= 0)</text:p>
      <text:p text:style-name="P16"/>
      <text:p text:style-name="P16">Por que em uma classe se deve usar o destrutor virtual?</text:p>
      <text:p text:style-name="P16"><text:s text:c="3"/><text:span text:style-name="T8">Para evitar memory leak</text:span></text:p>
      <text:p text:style-name="P16"/>
      <text:p text:style-name="P16"/>
      <text:p text:style-name="P16"><text:span text:style-name="T13">Herança</text:span>: Relação is-a. Derivada herda membros public/protected da base. Use herança pública na maioria dos casos.</text:p>
      <text:p text:style-name="P16"/>
      <text:p text:style-name="P16"><text:span text:style-name="T13">Classe abstrata</text:span>: Tem ao menos um método virtual puro (<text:span text:style-name="T5">= 0</text:span>). Define contrato. Não pode ser instanciado diretamente.</text:p>
      <text:p text:style-name="P16"/>
      <text:p text:style-name="P16"><text:span text:style-name="T13">Polimorfismo dinâmico</text:span>: Ponteiro/referência base+objetos derivados + métodos virtuais = método correto chamado runtime.</text:p>
      <text:p text:style-name="P16"/>
      <text:p text:style-name="P16"><text:span text:style-name="T13">Vtable</text:span>: Tabela <text:span text:style-name="T7">d</text:span>e ponteiros de funções gerado pelo compilador. Cada objeto tem vptr oculto para <text:s/>vtbale de sua classe final.</text:p>
      <text:p text:style-name="P16"/>
      <text:p text:style-name="P16"><text:span text:style-name="T13">Override / Final</text:span>: override valida assinatura em compilação. Final proíbe sobrescrita ou herança futura.</text:p>
      <text:p text:style-name="P16"><text:soft-page-break/></text:p>
      <text:p text:style-name="P16"><text:span text:style-name="T13">Destrutor virtual</text:span>: Obrigatório em base com métodos virtuas. Sem ele, deletar derivada via ponteiro base é UB</text:p>
      <text:p text:style-name="P16"/>
      <text:p text:style-name="P17"><text:span text:style-name="T13">Object slicing</text:span>: Copiar derivada por valor em variável base perde dados. Sempre use ponteiro ou referência para polimorfismo.</text:p>
      <text:p text:style-name="P17"/>
      <text:p text:style-name="P17"><text:span text:style-name="T13">Smart pointers</text:span>: Use <text:span text:style-name="T5">unique_ptr / shared_ptr</text:span> ao criar objetos polimórficos para evitar vazamento de memór<text:span text:style-name="T9">i</text:span>a </text:p>
      <text:p text:style-name="P17"/>
      <text:p text:style-name="P24">O que composição?</text:p>
      <text:p text:style-name="P18"><text:s text:c="2"/>Composição diferentemente de herança <text:span text:style-name="T10">a composição é algo como “Tem um”, <text:s/>enquanto herança “É um”</text:span></text:p>
      <text:p text:style-name="P18"/>
      <text:p text:style-name="P19"><text:span text:style-name="T12">Vantagens</text:span>:</text:p>
      <text:p text:style-name="P19">- <text:span text:style-name="T11">Has</text:span>-a</text:p>
      <text:p text:style-name="P19">- Reutilização</text:p>
      <text:p text:style-name="P19">- Baixo acoplamento</text:p>
      <text:p text:style-name="P19">- Flexibilidade</text:p>
      <text:p text:style-name="P19"/>
      <text:p text:style-name="P19">Princípio clássico: “Prefira composição à herança”-- GoF (Gang of Four), Designed Patterns, 1994. A composição tende a produzir sistemas mais flexíveis e fáceis de manter.</text:p>
      <text:p text:style-name="P19"/>
      <text:p text:style-name="P20">Orquestração – CI/CD</text:p>
      <text:p text:style-name="P20"/>
      <text:p text:style-name="P20"><text:soft-page-break/><text:span text:style-name="T16">Em C++, o modificador virtual é usado principalmente para habilitar o </text:span>polimorfismo dinâmico<text:span text:style-name="T19"> </text:span><text:span text:style-name="T16">(ou de runtime). Ele indica que um método de uma classe base pode ser </text:span>sobrescrito <text:span text:style-name="T16">por uma classe derivada, e a chamada correta será resolvida em tempo de execução com base no tipo real do objeto.</text:span><text:line-break/><text:line-break/>Métodos virtuais (classe base)<text:span text:style-name="T16">: Permite que uma classe derivada forneça sua própria implementação de um método definido na classe base.</text:span><text:line-break/>Destrutores virtuais<text:span text:style-name="T16">: Extremamente importante para evitar </text:span>memory leaks<text:span text:style-name="T19"> </text:span><text:span text:style-name="T16">quando se deleta um objeto derivado através de um ponteiro para a base.</text:span><text:line-break/>Herança virtual<text:span text:style-name="T19"> </text:span><text:span text:style-name="T16">: Usada para resolver o </text:span>problema do diamante<text:span text:style-name="T19"> </text:span><text:span text:style-name="T16">em herança múltipla, garantindo que uma classe base seja compartilhada entre várias classes derivadas.</text:span></text:p>
      <text:p text:style-name="P20"><text:span text:style-name="T14"/></text:p>
      <text:p text:style-name="P21"><text:span text:style-name="T15">Composição</text:span><text:span text:style-name="T16">:</text:span></text:p>
      <text:p text:style-name="P8">Relação – Forte</text:p>
      <text:p text:style-name="P8">Ciclo de vida – Componente depende do todo</text:p>
      <text:p text:style-name="P8">Acoplamento – Baixo</text:p>
      <text:p text:style-name="P8">Flexibilidade – Alta</text:p>
      <text:p text:style-name="P8">Destrição – Componente destruído junto</text:p>
      <text:p text:style-name="P9">Exemplo C++ - Motor motor;(membro valor)</text:p>
      <text:p text:style-name="P10"><text:soft-page-break/>Use quando: O componente faz todo sentido somente como parte do todo</text:p>
      <text:p text:style-name="P21"><text:span text:style-name="T16"/></text:p>
      <text:p text:style-name="P21"><text:span text:style-name="T15">Herança</text:span><text:span text:style-name="T16">:</text:span></text:p>
      <text:p text:style-name="P8">Relação – Is-a</text:p>
      <text:p text:style-name="P8">Ciclo de vida – Filho herda comportamento</text:p>
      <text:p text:style-name="P8">Acoplamento – Alto</text:p>
      <text:p text:style-name="P8">Flexibilidade – Baixa</text:p>
      <text:p text:style-name="P8">Destruição – Objeto filho gerencia própria memória</text:p>
      <text:p text:style-name="P21"><text:span text:style-name="T16"/></text:p>
      <text:p text:style-name="P21"><text:span text:style-name="T15">Agregação</text:span><text:span text:style-name="T16">: </text:span><text:span text:style-name="T18">funciona atraves de ponteiro</text:span></text:p>
      <text:p text:style-name="P8">Relação – Has-a (fraca)</text:p>
      <text:p text:style-name="P8">Ciclo de vida – Componente existe independemente</text:p>
      <text:p text:style-name="P8">Acoplamento – Baixo</text:p>
      <text:p text:style-name="P8">Flexibilidade – Alto</text:p>
      <text:p text:style-name="P8">Destruição – Componente sobrevive ao todo</text:p>
      <text:p text:style-name="P21"><text:span text:style-name="T16"/></text:p>
      <text:p text:style-name="P22"><text:span text:style-name="T17">Armadilha comum</text:span><text:span text:style-name="T16">: usar herança apenas para reutilizar código é um anti-padrão. Se a relação não for genuinamente is-a, prefira composição. Exemplo ruim: class Pilha : public Vector{}. <text:s/></text:span></text:p>
      <text:p text:style-name="P22"><text:span text:style-name="T16"/></text:p>
      <text:h text:style-name="P52" text:outline-level="1">Boas Práticas</text:h>
      <text:p text:style-name="P23"><text:span text:style-name="T16"/></text:p>
      <text:h text:style-name="P59" text:outline-level="2"><text:soft-page-break/>01) Use lista de inicialização no construtor</text:h>
      <text:p text:style-name="P11"><text:tab/>Sempre inicialize os membros e objetos via lista de inicialização(: motor(cil, pot)). É mais eficiente e necessário para tipos sem construtor padrão.</text:p>
      <text:p text:style-name="P23"><text:span text:style-name="T16"/></text:p>
      <text:h text:style-name="P59" text:outline-level="2">02) Membros por valor ou smart pointer</text:h>
      <text:p text:style-name="P11"><text:tab/>Em composição, prefira membros por valor ou std::unique_ptr. Evite raw pointers – eles complicam o gerenciamento de vida útil.</text:p>
      <text:p text:style-name="P23"><text:span text:style-name="T16"/></text:p>
      <text:h text:style-name="P59" text:outline-level="2">03) Delegação de responsabilidade</text:h>
      <text:p text:style-name="P11"><text:tab/>A classe composta deve delegar operações aos componentes. Não duplique lógica – se Motor sabe se ligar, Carro apenas chama motor.ligar().</text:p>
      <text:p text:style-name="P23"><text:span text:style-name="T16"/></text:p>
      <text:h text:style-name="P59" text:outline-level="2">04) Classes comp<text:span text:style-name="T20">o</text:span>n<text:span text:style-name="T20">en</text:span>tes coesas</text:h>
      <text:p text:style-name="P11"><text:tab/>Cada componente deve ter uma única responsabilidade clara. Classes pequenas e coesas são mais reutilizáveis.</text:p>
      <text:p text:style-name="P11"/>
      <text:p text:style-name="P11"/>
      <text:h text:style-name="P52" text:outline-level="1">O que aprendemos?</text:h>
      <text:p text:style-name="P3"/>
      <text:p text:style-name="P7">Conceito</text:p>
      <text:p text:style-name="P7"><text:soft-page-break/>composição = has-a relationship</text:p>
      <text:p text:style-name="P7"/>
      <text:p text:style-name="P7">Implementação</text:p>
      <text:p text:style-name="P7">Membro por valor ou unique_ptr</text:p>
      <text:p text:style-name="P7"/>
      <text:p text:style-name="P7">Vantagem Principal</text:p>
      <text:p text:style-name="P7">Baixo acoplamento e flexibilidade</text:p>
      <text:p text:style-name="P7"/>
      <text:p text:style-name="P7">VS Herança</text:p>
      <text:p text:style-name="P7">Prefira composição quando possível</text:p>
      <text:p text:style-name="P7"/>
      <text:p text:style-name="P7">Diferença da Agregação</text:p>
      <text:p text:style-name="P7">Componente depende do ciclo de vida do todo</text:p>
      <text:p text:style-name="P7"/>
      <text:p text:style-name="P7">Boa prática</text:p>
      <text:p text:style-name="P7">Delegação de responsabilidade</text:p>
      <text:p text:style-name="P7"/>
      <text:h text:style-name="P53" text:outline-level="1">Tratamento de Exceções em C++</text:h>
      <text:p text:style-name="P4"/>
      <text:p text:style-name="P1">Por que exceções existem?</text:p>
      <text:p text:style-name="P2"/>
      <text:p text:style-name="P2">Problema: Erros em tempo de execução que não devem ser ignoradas</text:p>
      <text:p text:style-name="P2">Alternativa antigo: Códigos de retorno fáceis de ignorar, poluem a lógica</text:p>
      <text:p text:style-name="P2"><text:soft-page-break/>Solução: Mecanismo estruturado – try / throw / catch</text:p>
      <text:p text:style-name="P2">Garantia: Erros não podem ser silenciosamente ignorados</text:p>
      <text:p text:style-name="P2"/>
      <text:p text:style-name="P25">Analogia: Pense em execuções como um <text:span text:style-name="T21">alarme de incêndio. </text:span><text:span text:style-name="T23">Quando o fogo(erro) é detectado, o alarme(throw) é acionado e interrompe tudo. O sistema de sprinkles(catch) entra em ação no ponto correto – não é preciso verificar manualmente cada sala.</text:span></text:p>
      <text:p text:style-name="P25"><text:span text:style-name="T23"/></text:p>
      <text:p text:style-name="P28">Código em: tratamento-de-erros.cpp</text:p>
      <text:p text:style-name="P27"><text:span text:style-name="T23"/></text:p>
      <text:p text:style-name="P28">O fluxo de execução do bloco try é interrompido assim que throw é alcançado. O controle salta diretamente para o bloco catch compatível, ignorando todo código intermédiario.</text:p>
      <text:p text:style-name="P26"><text:span text:style-name="T23"/></text:p>
      <text:p text:style-name="P28">O fluxo de controle:</text:p>
      <text:p text:style-name="P27"><text:span text:style-name="T23"/></text:p>
      <text:p text:style-name="P28">Bloco try <text:s text:c="3"/><text:tab/><text:tab/><text:tab/>trhow<text:tab/><text:tab/><text:tab/> <text:s text:c="5"/>Stack</text:p>
      <text:p text:style-name="P28">códifo normal <text:s/><text:tab/>→<text:tab/>erro detectado<text:tab/><text:tab/>→ unwinding</text:p>
      <text:p text:style-name="P27"><text:span text:style-name="T23"/></text:p>
      <text:p text:style-name="P27"><text:span text:style-name="T23"/></text:p>
      <text:h text:style-name="P54" text:outline-level="1">Sintaxe e Mecânica Completa</text:h>
      <text:p text:style-name="P29"/>
      <text:p text:style-name="P5">Analogia: O bloco try é uma <text:span text:style-name="T21">zona de risco</text:span> monitorada. Qualquer problema (throw) aciona o protocolo de resposta(catch). Você pode ter diferentes equipes de resposta (múltiplos catches) para diferentes tipos de emergência.</text:p>
      <text:p text:style-name="P5"/>
      <text:p text:style-name="P30">ORDEM IMPORTA! Os blocos catch são verificados em sequência, de cima para baixo. Coloque tipos mais específicos antes dos mais genéricos. O catch(…) deve ser sempre o último.</text:p>
      <text:p text:style-name="P30"/>
      <text:p text:style-name="P33">Estudar tipos de exceções em C++.</text:p>
      <text:p text:style-name="P31">throw; sem argumento dentro de um catch re-lança a exceção original preservando seu tipo real. Nunca use t<text:span text:style-name="T27">hr</text:span>ow e; para re-lançar – i<text:span text:style-name="T27">ss</text:span>o faz slicing do objeto de exceção, perdendo informarções de tipos derivados.</text:p>
      <text:p text:style-name="P31"/>
      <text:p text:style-name="P6"><text:soft-page-break/>É possível lançar qualquer tipo – int, string, struct – mas é uma praticamente ruim. <text:span text:style-name="T28">Prefira sempre classes derivadas de std::exception elas fornecem contexto via what() e se integram ao ecossistema padrão</text:span></text:p>
      <text:h text:style-name="P55" text:outline-level="1">Hierarquia de Exceção Padrão</text:h>
      <text:p text:style-name="P32"/>
      <text:p text:style-name="P6">Analogia: A hierarquia de exceções é como uma árvore de categorização</text:p>
      <text:p text:style-name="P6"/>
      <text:p text:style-name="P6">Logic_error</text:p>
      <text:p text:style-name="P6">Quando usar: Erro que o programador poderia evitar verificando pré-condições</text:p>
      <text:p text:style-name="P6">Exemplos: índices negativo, argumento nulo</text:p>
      <text:p text:style-name="P6"/>
      <text:p text:style-name="P6">Ca</text:p>
      <text:p text:style-name="P6"/>
      <text:p text:style-name="P6">Capturar por referência constante(const::exception&amp;) é essencial; evita cópia desnecessária.</text:p>
      <text:p text:style-name="P6"/>
      <text:h text:style-name="P56" text:outline-level="1">Programação Genérica com Templates</text:h>
      <text:p text:style-name="P44"><text:span text:style-name="T29"/></text:p>
      <text:p text:style-name="P38">O que são Templates?</text:p>
      <text:p text:style-name="P39"/>
      <text:p text:style-name="P45">Problema: <text:span text:style-name="T30">Repetir a mesma lógica para vários tipos de dados</text:span></text:p>
      <text:p text:style-name="P45">Solução: <text:span text:style-name="T30">Templates: código genérico parametrizado por tipo</text:span></text:p>
      <text:p text:style-name="P45">Paradigma: <text:span text:style-name="T30">Programação genérica resolvida em tempo de compilação</text:span></text:p>
      <text:p text:style-name="P45">Custo de runtime: <text:span text:style-name="T30">Zero – o compilador gera o código concreto para cada tipo</text:span></text:p>
      <text:p text:style-name="P45"><text:span text:style-name="T30"/></text:p>
      <text:p text:style-name="P38"><text:span text:style-name="T6">Analogia:</text:span> Um template é como um <text:span text:style-name="T21">molde</text:span><text:span text:style-name="T23"> de biscoite. O molde define a forma; você escolhe a massa (int, double, string,…). Para cada massa, um biscoito diferente é criado – mas com a mesma forma.</text:span></text:p>
      <text:p text:style-name="P39"><text:span text:style-name="T23"/></text:p>
      <text:p text:style-name="P40"><text:soft-page-break/><text:span text:style-name="T24">Atenção – code bloat</text:span><text:span text:style-name="T23">: o compilador gera um código separado para cada combinação de tipos e valores não-tipo. Usar templates com muitas cp,binações pode aumentar significativamente o tamanho do binário. </text:span></text:p>
      <text:p text:style-name="P44"><text:span text:style-name="T29"/></text:p>
      <text:h text:style-name="P57" text:outline-level="1">Class Templates</text:h>
      <text:p text:style-name="P41"><text:span text:style-name="T34">A</text:span>Analogia: Class templates são como um <text:span text:style-name="T21">projeto de contêiner genérico – </text:span><text:span text:style-name="T23">você projeta a caixa uma vez e define o tipo do conteúdo apenas quando for usar.</text:span></text:p>
      <text:p text:style-name="P42"><text:span text:style-name="T23"/></text:p>
      <text:p text:style-name="P46"><text:span text:style-name="T23">Parâmetros com </text:span><text:span text:style-name="T24">valor padrão </text:span><text:span text:style-name="T25">funcionam como em funções regulares: pode ser omitidos na instanciação. Note que Cap é um parâmetro não-tipo – seu valor é usado para dimensionar o array em tempos de compilação.</text:span></text:p>
      <text:p text:style-name="P46"><text:span text:style-name="T25"/></text:p>
      <text:h text:style-name="P58" text:outline-level="1">Especialização de Templates</text:h>
      <text:p text:style-name="P43"><text:span text:style-name="T6">Analogia</text:span>: <text:span text:style-name="T30">Especialização é como ter uma receita geral para bolos, mas uma receita especial para bolo de chocolate. Quando o ingrediente for chocolate, a receita especial entra em ação.</text:span></text:p>
      <text:p text:style-name="P43"><text:span text:style-name="T26"/></text:p>
      <text:h text:style-name="Heading_20_1" text:outline-level="1">Templates Avançados</text:h>
      <text:p text:style-name="P34"><text:span text:style-name="T35">SFINAE</text:span><text:span text:style-name="T31">(Substitution Failure Is not An Error)</text:span>:<text:span text:style-name="T30"> </text:span><text:span text:style-name="T31">quando a substituição de T falha no enbale_if, o compilador descarta silenciosamente essa sobrecarga, sem emitir erro – apenas se não houver outra candidata viável</text:span></text:p>
      <text:p text:style-name="P35"><text:span text:style-name="T31"/></text:p>
      <text:p text:style-name="P36"><text:span text:style-name="T35">P</text:span>esquisa sequencial e Pesquisa Binária </text:p>
      <text:p text:style-name="P36">Big O</text:p>
      <text:p text:style-name="P36">Selection Sort<text:span text:style-name="T30">: vai organizando selecionando o menor valor e jogando para o final da fila, </text:span><text:span text:style-name="T32">já organizado. </text:span><text:span text:style-name="T33">Ineficente para arrays grandes</text:span></text:p>
      <text:p text:style-name="P37"><text:span text:style-name="T33">S</text:span><text:span text:style-name="T30">election Sort realiza O(n) trocas, enquanto Bubble Sort que pode realizar O(n²).</text:span></text:p>
      <text:p text:style-name="P37"><text:span text:style-name="T30"/></text:p>
      <text:p text:style-name="P47">Insertion Sort<text:span text:style-name="T30">: Constrói o array ordenado um elemento por vez, inserindo cada novo elemento na posição correto dentro da parte já ordenada – assim como organizamos castas em um jogo</text:span></text:p>
      <text:p text:style-name="P48"><text:soft-page-break/>Melhor caso<text:span text:style-name="T30">: O(n) – array já ordenada</text:span></text:p>
      <text:p text:style-name="P48">Caso médio<text:span text:style-name="T30">: O(n²) n²/4 comparações</text:span></text:p>
      <text:p text:style-name="P48">Pior caso<text:span text:style-name="T30">: O(n²) – array invertido</text:span></text:p>
      <text:p text:style-name="P48">Espaço extra<text:span text:style-name="T30">: O(1) – In-place</text:span></text:p>
      <text:p text:style-name="P60">O Insertion Sort é adaptativo – para arrays quase ordenados, sua eficiência se aproxima de O(n). É algoritmo de escolha para pequenos arrays (n &lt; 20~30) e é usado internamente por algoritmos híbridos como o Timsort.</text:p>
      <text:p text:style-name="P49"><text:span text:style-name="T30"/></text:p>
      <text:p text:style-name="P50">Merge Sort – Classificação por Intercalação</text:p>
      <text:p text:style-name="P50"><text:span text:style-name="T30">Algoritmo de divisão e conquista que divide recursivamente o array ao meio, ordena cada metade e depois </text:span><text:span text:style-name="T22">intercala </text:span><text:span text:style-name="T30">os resultados. Garante O(n log n) em todos os casos.</text:span></text:p>
      <text:p text:style-name="P50"><text:span text:style-name="T30"/></text:p>
      <text:p text:style-name="P50"><text:span text:style-name="T30"/></text:p>
      <text:p text:style-name="P50"><text:span text:style-name="T30"/></text:p>
      <text:p text:style-name="P51"><text:span text:style-name="T30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Google Sans" svg:font-family="'Google Sans', Roboto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14T16:45:03.954468582</meta:creation-date>
    <dc:date>2026-05-26T16:33:27.324731011</dc:date>
    <meta:editing-duration>PT4H26M11S</meta:editing-duration>
    <meta:editing-cycles>46</meta:editing-cycles>
    <meta:generator>LibreOffice/24.2.7.2$Linux_X86_64 LibreOffice_project/420$Build-2</meta:generator>
    <meta:document-statistic meta:table-count="0" meta:image-count="0" meta:object-count="0" meta:page-count="11" meta:paragraph-count="138" meta:word-count="1421" meta:character-count="9546" meta:non-whitespace-character-count="8199"/>
  </office:meta>
</office:document-meta>
</file>